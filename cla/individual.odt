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5BD3F1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Individual Contributor License Agreement</text:p>
      <text:p text:style-name="Standard"/>
      <text:p text:style-name="Standard">Thank you for your interest in contributing to Next Job Spy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https://github.com/Jared-Dev/next-job-spy/blob/master/CONTRIBUTING.md.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the individual who Submits a Contribution to Us.</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the "Contributing code you don't fully own" section of CONTRIBUTING.md.</text:p>
      <text:p text:style-name="Standard"/>
      <text:p text:style-name="Standard"><text:s text:c="8"/>"Copyright" means all rights protecting works of authorship owned or controlled by You,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text:soft-page-break/>(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wn the Copyright and patent claims covering the Contribution which are required to grant the rights under Section 2. <text:s/></text:p>
      <text:p text:style-name="Standard"/>
      <text:p text:style-name="Standard">(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Standard">(d) You have followed the instructions in the "Contributing code you don't fully own" section of CONTRIBUTING.md,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text:soft-page-break/>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the State of Missouri, United States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text:p>
      <text:p text:style-name="P2">________________________</text:p>
      <text:p text:style-name="P2">Nam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Jared Malcolm</text:p>
      <text:p text:style-name="P2">Title:<text:tab/>Maintainer</text:p>
      <text:p text:style-name="P2">Address:<text:tab/>Carl Junction, MO</text:p>
      <text:p text:style-name="P2"><text:tab/>________________________</text:p>
      <text:p text:style-name="Standard"/>
      <text:p text:style-name="P5"><draw:frame draw:style-name="fr1" draw:name="graphics1" text:anchor-type="paragraph" svg:width="0.9165in" svg:height="0.3228in" draw:z-index="0"><draw:image xlink:href="Pictures/10000000000000580000001F5BD3F107.png" xlink:type="simple" xlink:show="embed" xlink:actuate="onLoad"/></draw:frame>This work is licensed under a <text:a xlink:type="simple" xlink:href="http://creativecommons.org/licenses/by/3.0/">Creative Commons Attribution 3.0 Unported Licens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Individual Contributor License Agreement (HA-CLA-I)<text:tab/><text:tab/><text:page-number text:select-page="current">4</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2-03-11T12:40:16</dc:date>
    <meta:editing-duration>PT55M18S</meta:editing-duration>
    <meta:editing-cycles>23</meta:editing-cycles>
    <meta:generator>LibreOffice/3.4$Unix LibreOffice_project/340m1$Build-402</meta:generator>
    <dc:creator>Allison Randal</dc:creator>
    <meta:document-statistic meta:table-count="0" meta:image-count="1" meta:object-count="0" meta:page-count="4" meta:paragraph-count="58" meta:word-count="1600" meta:character-count="10115" meta:non-whitespace-character-count="8498"/>
  </office:meta>
</office:document-meta>
</file>